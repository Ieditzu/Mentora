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75dc8" officeooo:paragraph-rsid="00075dc8"/>
    </style:style>
    <style:style style:name="T1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ntora — Ideas for Nationals</text:h>
      <text:p text:style-name="Text_20_body">Ideas brainstormed for InfoEducație Națională. Tick off as implemented.</text:p>
      <text:p text:style-name="Horizontal_20_Line"/>
      <text:h text:style-name="Heading_20_2" text:outline-level="2">Game (Unity 3D)</text:h>
      <text:h text:style-name="Heading_20_3" text:outline-level="3">[x] AI generates new tasks based on your profile</text:h>
      <text:p text:style-name="Text_20_body">Instead of 22 static tasks forever, the server reads the child's weak areas from their learning profile and generates a brand new coding challenge via LLaMA targeting exactly where they're struggling. No two students get the same generated challenge. Implemented via <text:span text:style-name="T1">GenerateAiTaskPacket</text:span> (45) / <text:span text:style-name="T1">GenerateAiTaskResponsePacket</text:span> (46) + <text:span text:style-name="T1">AiChallengePad.cs</text:span>.</text:p>
      <text:h text:style-name="Heading_20_3" text:outline-level="3">[x] Robot companion that follows you and remembers everything</text:h>
      <text:p text:style-name="Text_20_body">An NPC robot that follows the player around, reads their full learning profile, and makes contextual comments — "last time you tried this you forgot to initialize your variable." Reacts to challenge success/fail in real time. Implemented via <text:span text:style-name="T1">CompanionSpeakPacket</text:span> (47) / <text:span text:style-name="T1">CompanionSpeakResponsePacket</text:span> (48) + <text:span text:style-name="T1">RobotCompanion.cs</text:span>.</text:p>
      <text:h text:style-name="Heading_20_3" text:outline-level="3">[ ] Your code literally controls the world</text:h>
      <text:p text:style-name="Text_20_body">Instead of stdout text, student code has visible 3D consequences. Write a loop → a robot NPC walks that loop in the scene. Write a factorial → a tower of blocks builds floor by floor. Wrong output → the structure breaks visually. Requires Unity event mapping from server output to scene objects.</text:p>
      <text:h text:style-name="Heading_20_3" text:outline-level="3">[ ] The world is broken — your code fixes it</text:h>
      <text:p text:style-name="Text_20_body">Make every task diegetic. The bridge is broken because of a bug in its control code — debug it and the bridge physically rebuilds. The island is frozen in an infinite loop — find it and time resumes. Coding becomes world repair, not homework.</text:p>
      <text:h text:style-name="Heading_20_3" text:outline-level="3">[ ] Expand logic/physics puzzles from 3 to 10+</text:h>
      <text:p text:style-name="Text_20_body">Current: only 3 (jumpVelocity, islandVisible, bridge). Add physics simulations students can solve by setting variables:</text:p>
      <text:list text:style-name="L1">
        <text:list-item>
          <text:p text:style-name="P1">Adjust rocket thrust + drag to land on a platform</text:p>
        </text:list-item>
        <text:list-item>
          <text:p text:style-name="P1">Set pendulum length + angle to hit a target</text:p>
        </text:list-item>
        <text:list-item>
          <text:p text:style-name="P1">Configure ball friction + mass to navigate a maze Each is a "virtual experiment" — exactly what judges want to see.</text:p>
        </text:list-item>
      </text:list>
      <text:h text:style-name="Heading_20_3" text:outline-level="3" text:is-list-header="true"><text:soft-page-break/>[ ] Competitive coding islands</text:h>
      <text:p text:style-name="Text_20_body">Two students race to solve the same challenge simultaneously. Countdown timer, both coding in parallel. Winner's solution posts on an island leaderboard. Even async: race your friend's ghost run time.</text:p>
      <text:p text:style-name="Horizontal_20_Line"/>
      <text:h text:style-name="Heading_20_2" text:outline-level="2">Android App</text:h>
      <text:h text:style-name="Heading_20_3" text:outline-level="3">[ ] Live session spectator mode</text:h>
      <text:p text:style-name="Text_20_body">Parent opens app while child is playing and sees a live feed: which pad they're at, what code they're typing, attempt count, whether they asked for a hint. Same WebSocket infrastructure, more events.</text:p>
      <text:h text:style-name="Heading_20_3" text:outline-level="3">[ ] Weekly AI report card</text:h>
      <text:p text:style-name="Text_20_body">Every Monday the app generates a natural-language letter from the AI tutor:</text:p>
      <text:p text:style-name="Quotations">"This week Andrei spent 3 sessions on Python. He consistently miscounts loop ranges — appeared in 5 of 8 mistakes..." All data already exists. One Groq call with a smart prompt.</text:p>
      <text:h text:style-name="Heading_20_3" text:outline-level="3">[ ] Parent sets tonight's challenge</text:h>
      <text:p text:style-name="Text_20_body">From the app, parent sends a custom challenge push to the game: "Try the factorial task before dinner." Child sees it in-game as a notification from their parent. Parent gets push on completion.</text:p>
      <text:h text:style-name="Heading_20_3" text:outline-level="3">[ ] Learning heatmap calendar</text:h>
      <text:p text:style-name="Text_20_body">GitHub contribution-style graph — green/yellow/red days based on session quality. Far more readable than "streak: 6 days."</text:p>
      <text:h text:style-name="Heading_20_3" text:outline-level="3">[ ] Skill radar chart</text:h>
      <text:p text:style-name="Text_20_body">Hexagonal radar with axes: Loops, Functions, Conditionals, Recursion, Memory, Data Structures. Fills as child demonstrates competency. The visual parents screenshot and share.</text:p>
      <text:p text:style-name="Horizontal_20_Line"/>
      <text:h text:style-name="Heading_20_2" text:outline-level="2">Web Creator</text:h>
      <text:h text:style-name="Heading_20_3" text:outline-level="3">[ ] AI generates quiz questions for you</text:h>
      <text:p text:style-name="Text_20_body">Educator types topic ("Python list comprehensions, intermediate"). AI drafts 8 questions. Educator reviews and approves. Course creation drops from 40 minutes to 5.</text:p>
      <text:h text:style-name="Heading_20_3" text:outline-level="3">[ ] Per-question difficulty heatmap</text:h>
      <text:p text:style-name="Text_20_body">After students take a course: each question color-coded by % wrong, most common wrong answer, <text:soft-page-break/>average time spent. Educator sees exactly which questions need rewriting.</text:p>
      <text:h text:style-name="Heading_20_3" text:outline-level="3">[ ] Preview in-game before publishing</text:h>
      <text:p text:style-name="Text_20_body">Button: "Preview in Unity" — sends packet to a connected game instance and the course appears exactly as students will see it, before publish.</text:p>
      <text:h text:style-name="Heading_20_3" text:outline-level="3">[ ] Educator analytics dashboard</text:h>
      <text:p text:style-name="Text_20_body">Per-course stats: total students attempted, average score, completion rate, most common wrong answers. Turns the creator from "quiz editor" into a real content management system.</text:p>
      <text:p text:style-name="Text_20_body"/>
      <text:p text:style-name="P2">Make it so we have voice recgniction and u can ask rudolf questions and it answ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30T13:51:46.746169836</dc:date>
    <meta:editing-duration>PT29S</meta:editing-duration>
    <meta:editing-cycles>1</meta:editing-cycles>
    <meta:document-statistic meta:table-count="0" meta:image-count="0" meta:object-count="0" meta:page-count="3" meta:paragraph-count="40" meta:word-count="653" meta:character-count="4106" meta:non-whitespace-character-count="3487"/>
    <meta:generator>LibreOffice/26.2.3.2$Linux_X86_64 LibreOffice_project/620$Build-2</meta:generator>
  </office:meta>
</office:document-meta>
</file>